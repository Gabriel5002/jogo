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% ==========================================================</text:p>
      <text:p text:style-name="Standard">% RPG LÓGICO INFERNAL - PLANEJAMENTO OTIMIZADO</text:p>
      <text:p text:style-name="Standard">% ==========================================================</text:p>
      <text:p text:style-name="Standard"/>
      <text:p text:style-name="Standard">% =========================</text:p>
      <text:p text:style-name="Standard">% 1. ESTADO</text:p>
      <text:p text:style-name="Standard">% =========================</text:p>
      <text:p text:style-name="Standard"/>
      <text:p text:style-name="Standard">% estado(Posicao, Inventario, Derrotados, Vida, Custo)</text:p>
      <text:p text:style-name="Standard"/>
      <text:p text:style-name="Standard">estado_inicial(</text:p>
      <text:p text:style-name="Standard"><text:s text:c="4"/>estado(vila, [], [], 12, 0)</text:p>
      <text:p text:style-name="Standard">).</text:p>
      <text:p text:style-name="Standard"/>
      <text:p text:style-name="Standard">% =========================</text:p>
      <text:p text:style-name="Standard">% 2. MAPA</text:p>
      <text:p text:style-name="Standard">% =========================</text:p>
      <text:p text:style-name="Standard"/>
      <text:p text:style-name="Standard">conectado(vila, floresta).</text:p>
      <text:p text:style-name="Standard">conectado(floresta, caverna).</text:p>
      <text:p text:style-name="Standard">conectado(caverna, ruinas).</text:p>
      <text:p text:style-name="Standard">conectado(ruinas, torre).</text:p>
      <text:p text:style-name="Standard">conectado(torre, dragao).</text:p>
      <text:p text:style-name="Standard"/>
      <text:p text:style-name="Standard">caminho(X,Y) :- conectado(X,Y).</text:p>
      <text:p text:style-name="Standard">caminho(X,Y) :- conectado(Y,X).</text:p>
      <text:p text:style-name="Standard"/>
      <text:p text:style-name="Standard">% =========================</text:p>
      <text:p text:style-name="Standard">% 3. ITENS</text:p>
      <text:p text:style-name="Standard">% =========================</text:p>
      <text:p text:style-name="Standard"/>
      <text:p text:style-name="Standard">local_item(espada, floresta).</text:p>
      <text:p text:style-name="Standard">local_item(escudo, vila).</text:p>
      <text:p text:style-name="Standard">local_item(chave, caverna).</text:p>
      <text:p text:style-name="Standard">local_item(cajado, torre).</text:p>
      <text:p text:style-name="Standard">local_item(armadura, ruinas).</text:p>
      <text:p text:style-name="Standard"/>
      <text:p text:style-name="Standard">% =========================</text:p>
      <text:p text:style-name="Standard">% 4. INIMIGOS</text:p>
      <text:p text:style-name="Standard">% =========================</text:p>
      <text:p text:style-name="Standard"/>
      <text:p text:style-name="Standard">inimigo(goblin, floresta, 5).</text:p>
      <text:p text:style-name="Standard">inimigo(troll, caverna, 9).</text:p>
      <text:p text:style-name="Standard">inimigo(espectro, ruinas, 13).</text:p>
      <text:p text:style-name="Standard">inimigo(dragao, dragao, 25).</text:p>
      <text:p text:style-name="Standard"/>
      <text:p text:style-name="Standard">% =========================</text:p>
      <text:p text:style-name="Standard">% 5. PODER</text:p>
      <text:p text:style-name="Standard">% =========================</text:p>
      <text:p text:style-name="Standard"/>
      <text:p text:style-name="Standard">poder([],1).</text:p>
      <text:p text:style-name="Standard">poder([espada|T],P) :- poder(T,P1), P is P1 + 6.</text:p>
      <text:p text:style-name="Standard"><text:soft-page-break/>poder([escudo|T],P) :- poder(T,P1), P is P1 + 3.</text:p>
      <text:p text:style-name="Standard">poder([cajado|T],P) :- poder(T,P1), P is P1 + 7.</text:p>
      <text:p text:style-name="Standard">poder([armadura|T],P) :- poder(T,P1), P is P1 + 5.</text:p>
      <text:p text:style-name="Standard">poder([_|T],P) :- poder(T,P).</text:p>
      <text:p text:style-name="Standard"/>
      <text:p text:style-name="Standard">% =========================</text:p>
      <text:p text:style-name="Standard">% 6. AÇÕES COM CUSTO</text:p>
      <text:p text:style-name="Standard">% =========================</text:p>
      <text:p text:style-name="Standard"/>
      <text:p text:style-name="Standard">% mover custa 1</text:p>
      <text:p text:style-name="Standard">acao(</text:p>
      <text:p text:style-name="Standard"><text:s text:c="4"/>mover(De,Para),</text:p>
      <text:p text:style-name="Standard"><text:s text:c="4"/>estado(De,Inv,Der,V,C),</text:p>
      <text:p text:style-name="Standard"><text:s text:c="4"/>estado(Para,Inv,Der,V,C1)</text:p>
      <text:p text:style-name="Standard">) :-</text:p>
      <text:p text:style-name="Standard"><text:s text:c="4"/>caminho(De,Para),</text:p>
      <text:p text:style-name="Standard"><text:s text:c="4"/>C1 is C + 1.</text:p>
      <text:p text:style-name="Standard"/>
      <text:p text:style-name="Standard">% pegar item custa 1</text:p>
      <text:p text:style-name="Standard">acao(</text:p>
      <text:p text:style-name="Standard"><text:s text:c="4"/>pegar(Item),</text:p>
      <text:p text:style-name="Standard"><text:s text:c="4"/>estado(Local,Inv,Der,V,C),</text:p>
      <text:p text:style-name="Standard"><text:s text:c="4"/>estado(Local,[Item|Inv],Der,V,C1)</text:p>
      <text:p text:style-name="Standard">) :-</text:p>
      <text:p text:style-name="Standard"><text:s text:c="4"/>local_item(Item, Local),</text:p>
      <text:p text:style-name="Standard"><text:s text:c="4"/>\+ member(Item, Inv),</text:p>
      <text:p text:style-name="Standard"><text:s text:c="4"/>C1 is C + 1.</text:p>
      <text:p text:style-name="Standard"/>
      <text:p text:style-name="Standard">% lutar custa vida e aumenta custo</text:p>
      <text:p text:style-name="Standard">acao(</text:p>
      <text:p text:style-name="Standard"><text:s text:c="4"/>lutar(Inimigo),</text:p>
      <text:p text:style-name="Standard"><text:s text:c="4"/>estado(Local,Inv,Der,V,C),</text:p>
      <text:p text:style-name="Standard"><text:s text:c="4"/>estado(Local,Inv,[Inimigo|Der],V2,C1)</text:p>
      <text:p text:style-name="Standard">) :-</text:p>
      <text:p text:style-name="Standard"><text:s text:c="4"/>inimigo(Inimigo, Local, Forca),</text:p>
      <text:p text:style-name="Standard"><text:s text:c="4"/>\+ member(Inimigo, Der),</text:p>
      <text:p text:style-name="Standard"><text:s text:c="4"/>poder(Inv, P),</text:p>
      <text:p text:style-name="Standard"><text:s text:c="4"/>P + V &gt;= Forca,</text:p>
      <text:p text:style-name="Standard"><text:s text:c="4"/>V2 is V - 3,</text:p>
      <text:p text:style-name="Standard"><text:s text:c="4"/>V2 &gt; 0,</text:p>
      <text:p text:style-name="Standard"><text:s text:c="4"/>C1 is C + 2.</text:p>
      <text:p text:style-name="Standard"/>
      <text:p text:style-name="Standard">% =========================</text:p>
      <text:p text:style-name="Standard">% 7. RESTRIÇÕES INFERNAIS</text:p>
      <text:p text:style-name="Standard">% =========================</text:p>
      <text:p text:style-name="Standard"/>
      <text:p text:style-name="Standard">% não pode lutar dragão sem chave</text:p>
      <text:p text:style-name="Standard">restricao(estado(_,Inv,_,_,_)) :-</text:p>
      <text:p text:style-name="Standard"><text:s text:c="4"/>(member(dragao, Inv) -&gt; member(chave, Inv) ; true).</text:p>
      <text:p text:style-name="Standard"/>
      <text:p text:style-name="Standard">% precisa de arma forte para dragão</text:p>
      <text:p text:style-name="Standard">arma_forte(Inv) :-</text:p>
      <text:p text:style-name="Standard"><text:soft-page-break/><text:s text:c="4"/>member(espada, Inv);</text:p>
      <text:p text:style-name="Standard"><text:s text:c="4"/>member(cajado, Inv).</text:p>
      <text:p text:style-name="Standard"/>
      <text:p text:style-name="Standard">% =========================</text:p>
      <text:p text:style-name="Standard">% 8. OBJETIVO</text:p>
      <text:p text:style-name="Standard">% =========================</text:p>
      <text:p text:style-name="Standard"/>
      <text:p text:style-name="Standard">objetivo(</text:p>
      <text:p text:style-name="Standard"><text:s text:c="4"/>estado(dragao, Inv, Der, V, _)</text:p>
      <text:p text:style-name="Standard">) :-</text:p>
      <text:p text:style-name="Standard"><text:s text:c="4"/>member(dragao, Der),</text:p>
      <text:p text:style-name="Standard"><text:s text:c="4"/>member(chave, Inv),</text:p>
      <text:p text:style-name="Standard"><text:s text:c="4"/>arma_forte(Inv),</text:p>
      <text:p text:style-name="Standard"><text:s text:c="4"/>V &gt; 0.</text:p>
      <text:p text:style-name="Standard"/>
      <text:p text:style-name="Standard">% =========================</text:p>
      <text:p text:style-name="Standard">% 9. PLANEJAMENTO COM PODA</text:p>
      <text:p text:style-name="Standard">% =========================</text:p>
      <text:p text:style-name="Standard"/>
      <text:p text:style-name="Standard">planejar(Estado, _, [], Estado) :-</text:p>
      <text:p text:style-name="Standard"><text:s text:c="4"/>objetivo(Estado).</text:p>
      <text:p text:style-name="Standard"/>
      <text:p text:style-name="Standard">planejar(Estado, Visitados, [Acao|Plano], Final) :-</text:p>
      <text:p text:style-name="Standard"><text:s text:c="4"/>acao(Acao, Estado, NovoEstado),</text:p>
      <text:p text:style-name="Standard"><text:s text:c="4"/>NovoEstado = estado(_,_,_,V,_),</text:p>
      <text:p text:style-name="Standard"><text:s text:c="4"/>V &gt; 0, % poda por morte</text:p>
      <text:p text:style-name="Standard"><text:s text:c="4"/>\+ member(NovoEstado, Visitados),</text:p>
      <text:p text:style-name="Standard"><text:s text:c="4"/>restricao(NovoEstado),</text:p>
      <text:p text:style-name="Standard"><text:s text:c="4"/>planejar(NovoEstado, [NovoEstado|Visitados], Plano, Final).</text:p>
      <text:p text:style-name="Standard"/>
      <text:p text:style-name="Standard">% =========================</text:p>
      <text:p text:style-name="Standard">% 10. MELHOR SOLUÇÃO (OTIMIZAÇÃO)</text:p>
      <text:p text:style-name="Standard">% =========================</text:p>
      <text:p text:style-name="Standard"/>
      <text:p text:style-name="Standard">resolver_melhor(PlanoMelhor) :-</text:p>
      <text:p text:style-name="Standard"><text:s text:c="4"/>findall((Plano,Custo),</text:p>
      <text:p text:style-name="Standard"><text:s text:c="8"/>(</text:p>
      <text:p text:style-name="Standard"><text:s text:c="12"/>estado_inicial(E),</text:p>
      <text:p text:style-name="Standard"><text:s text:c="12"/>planejar(E,[E],Plano,estado(_,_,_,_,Custo))</text:p>
      <text:p text:style-name="Standard"><text:s text:c="8"/>),</text:p>
      <text:p text:style-name="Standard"><text:s text:c="8"/>Solucoes),</text:p>
      <text:p text:style-name="Standard"><text:s text:c="4"/>melhor_plano(Solucoes, PlanoMelhor).</text:p>
      <text:p text:style-name="Standard"/>
      <text:p text:style-name="Standard">melhor_plano([(P,_)], P).</text:p>
      <text:p text:style-name="Standard">melhor_plano([(P1,C1),(P2,C2)|Resto], Melhor) :-</text:p>
      <text:p text:style-name="Standard"><text:s text:c="4"/>(C1 =&lt; C2 -&gt;</text:p>
      <text:p text:style-name="Standard"><text:s text:c="8"/>melhor_plano([(P1,C1)|Resto], Melhor)</text:p>
      <text:p text:style-name="Standard"><text:s text:c="4"/>;</text:p>
      <text:p text:style-name="Standard"><text:s text:c="8"/>melhor_plano([(P2,C2)|Resto], Melhor)</text:p>
      <text:p text:style-name="Standard"><text:s text:c="4"/>)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7T08:29:46.690412900</meta:creation-date>
    <dc:date>2026-05-07T08:30:08.514719700</dc:date>
    <meta:editing-duration>PT21S</meta:editing-duration>
    <meta:editing-cycles>1</meta:editing-cycles>
    <meta:document-statistic meta:table-count="0" meta:image-count="0" meta:object-count="0" meta:page-count="3" meta:paragraph-count="127" meta:word-count="353" meta:character-count="3334" meta:non-whitespace-character-count="2876"/>
    <meta:generator>LibreOffice/25.8.5.2$Windows_X86_64 LibreOffice_project/9c8b85f387cc00a89945a79c9e6239f32e450ac2</meta:generator>
  </office:meta>
</office:document-meta>
</file>