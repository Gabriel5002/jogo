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Preformatted_20_Text">
      <style:paragraph-properties fo:margin-left="0cm" fo:margin-right="0cm" fo:text-indent="0cm" style:auto-text-indent="false"/>
    </style:style>
    <style:style style:name="P19" style:family="paragraph" style:parent-style-name="Preformatted_20_Text">
      <style:paragraph-properties fo:margin-top="0cm" fo:margin-bottom="0.499cm" style:contextual-spacing="false"/>
    </style:style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1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RELATÓRIO – RPG LÓGICO INFERNAL</text:h>
      <text:p text:style-name="Horizontal_20_Line"/>
      <text:h text:style-name="Heading_20_2" text:outline-level="2">🧩 1. Introdução</text:h>
      <text:p text:style-name="Text_20_body">Este trabalho tem como objetivo desenvolver um jogo utilizando <text:span text:style-name="Strong_20_Emphasis">programação lógica</text:span>, especificamente na linguagem <text:span text:style-name="Strong_20_Emphasis">Prolog</text:span>, explorando conceitos como:</text:p>
      <text:list text:style-name="L1">
        <text:list-item>
          <text:p text:style-name="P1">Inferência lógica </text:p>
        </text:list-item>
        <text:list-item>
          <text:p text:style-name="P1">Unificação </text:p>
        </text:list-item>
        <text:list-item>
          <text:p text:style-name="P1">Backtracking </text:p>
        </text:list-item>
        <text:list-item>
          <text:p text:style-name="P2">Modelagem declarativa </text:p>
        </text:list-item>
      </text:list>
      <text:p text:style-name="Text_20_body">Diferente de linguagens imperativas, onde o controle do fluxo é explícito, neste projeto o comportamento do jogo <text:span text:style-name="Strong_20_Emphasis">emerge a partir de fatos e regras</text:span>, permitindo que o próprio Prolog encontre soluções para os desafios propostos.</text:p>
      <text:p text:style-name="Text_20_body">O jogo desenvolvido é um <text:span text:style-name="Strong_20_Emphasis">RPG lógico de alta complexidade (“modo infernal”)</text:span>, onde o jogador deve explorar um mapa, coletar itens, enfrentar inimigos e atingir um objetivo final através de decisões estratégicas inferidas automaticamente.</text:p>
      <text:p text:style-name="Horizontal_20_Line"/>
      <text:h text:style-name="Heading_20_2" text:outline-level="2">🗺️ 2. Descrição do Jogo</text:h>
      <text:p text:style-name="Text_20_body">O jogo se passa em um mundo composto por diferentes locais conectados:</text:p>
      <text:list text:style-name="L2">
        <text:list-item>
          <text:p text:style-name="P3">Vila (início) </text:p>
        </text:list-item>
        <text:list-item>
          <text:p text:style-name="P3">Floresta </text:p>
        </text:list-item>
        <text:list-item>
          <text:p text:style-name="P3">Caverna </text:p>
        </text:list-item>
        <text:list-item>
          <text:p text:style-name="P3">Ruínas </text:p>
        </text:list-item>
        <text:list-item>
          <text:p text:style-name="P3">Torre </text:p>
        </text:list-item>
        <text:list-item>
          <text:p text:style-name="P4">Covil do Dragão (objetivo final) </text:p>
        </text:list-item>
      </text:list>
      <text:p text:style-name="Text_20_body">O jogador:</text:p>
      <text:list text:style-name="L3">
        <text:list-item>
          <text:p text:style-name="P5">Começa com vida limitada </text:p>
        </text:list-item>
        <text:list-item>
          <text:p text:style-name="P5">Não possui itens inicialmente </text:p>
        </text:list-item>
        <text:list-item>
          <text:p text:style-name="P5">Deve explorar o mapa </text:p>
        </text:list-item>
        <text:list-item>
          <text:p text:style-name="P5">Coletar itens estratégicos </text:p>
        </text:list-item>
        <text:list-item>
          <text:p text:style-name="P5">Derrotar inimigos </text:p>
        </text:list-item>
        <text:list-item>
          <text:p text:style-name="P6">Sobreviver até derrotar o dragão </text:p>
        </text:list-item>
      </text:list>
      <text:p text:style-name="Horizontal_20_Line"/>
      <text:h text:style-name="Heading_20_3" text:outline-level="3">🎯 Objetivo</text:h>
      <text:p text:style-name="Text_20_body">Derrotar o <text:span text:style-name="Strong_20_Emphasis">dragão</text:span> respeitando todas as restrições:</text:p>
      <text:list text:style-name="L4">
        <text:list-item>
          <text:p text:style-name="P7"><text:soft-page-break/>Possuir a <text:span text:style-name="Strong_20_Emphasis">chave</text:span> </text:p>
        </text:list-item>
        <text:list-item>
          <text:p text:style-name="P7">Ter uma <text:span text:style-name="Strong_20_Emphasis">arma forte</text:span> </text:p>
        </text:list-item>
        <text:list-item>
          <text:p text:style-name="P8">Estar vivo ao final </text:p>
        </text:list-item>
      </text:list>
      <text:p text:style-name="Horizontal_20_Line"/>
      <text:h text:style-name="Heading_20_2" text:outline-level="2">🧠 3. Modelagem do Conhecimento</text:h>
      <text:p text:style-name="Text_20_body">O sistema foi modelado utilizando <text:span text:style-name="Strong_20_Emphasis">fatos e regras</text:span>, sem controle imperativo.</text:p>
      <text:p text:style-name="Horizontal_20_Line"/>
      <text:h text:style-name="Heading_20_3" text:outline-level="3">📌 Estado do jogo</text:h>
      <text:section text:style-name="Sect1" text:name="code-block-viewer">
        <text:p text:style-name="P9"><text:span text:style-name="Source_20_Text">estado(Posicao, Inventario, Derrotados, Vida, Custo)</text:span></text:p>
      </text:section>
      <text:p text:style-name="Text_20_body">Onde:</text:p>
      <text:list text:style-name="L5">
        <text:list-item>
          <text:p text:style-name="P10"><text:span text:style-name="Source_20_Text">Posicao</text:span>: local atual </text:p>
        </text:list-item>
        <text:list-item>
          <text:p text:style-name="P10"><text:span text:style-name="Source_20_Text">Inventario</text:span>: itens coletados </text:p>
        </text:list-item>
        <text:list-item>
          <text:p text:style-name="P10"><text:span text:style-name="Source_20_Text">Derrotados</text:span>: inimigos vencidos </text:p>
        </text:list-item>
        <text:list-item>
          <text:p text:style-name="P10"><text:span text:style-name="Source_20_Text">Vida</text:span>: energia do jogador </text:p>
        </text:list-item>
        <text:list-item>
          <text:p text:style-name="P11"><text:span text:style-name="Source_20_Text">Custo</text:span>: custo total das ações </text:p>
        </text:list-item>
      </text:list>
      <text:p text:style-name="Horizontal_20_Line"/>
      <text:h text:style-name="Heading_20_3" text:outline-level="3">📌 Fatos principais</text:h>
      <text:h text:style-name="Heading_20_4" text:outline-level="4">Mapa:</text:h>
      <text:section text:style-name="Sect1" text:name="Seção1">
        <text:p text:style-name="P9"><text:bookmark text:name="code-block-viewer"/><text:span text:style-name="Source_20_Text">conectado(vila, floresta).</text:span></text:p>
      </text:section>
      <text:h text:style-name="Heading_20_4" text:outline-level="4">Itens:</text:h>
      <text:section text:style-name="Sect1" text:name="Seção2">
        <text:p text:style-name="P9"><text:bookmark text:name="code-block-viewer Copia 1"/><text:span text:style-name="Source_20_Text">local_item(espada, floresta).</text:span></text:p>
      </text:section>
      <text:h text:style-name="Heading_20_4" text:outline-level="4">Inimigos:</text:h>
      <text:section text:style-name="Sect1" text:name="Seção3">
        <text:p text:style-name="P9"><text:bookmark text:name="code-block-viewer Copia 2"/><text:span text:style-name="Source_20_Text">inimigo(troll, caverna, 9).</text:span></text:p>
      </text:section>
      <text:p text:style-name="Horizontal_20_Line"/>
      <text:h text:style-name="Heading_20_3" text:outline-level="3">📌 Regras importantes</text:h>
      <text:h text:style-name="Heading_20_4" text:outline-level="4">Movimento:</text:h>
      <text:section text:style-name="Sect1" text:name="Seção4">
        <text:p text:style-name="P9"><text:bookmark text:name="code-block-viewer Copia 3"/><text:span text:style-name="Source_20_Text">acao(mover(De,Para), ...)</text:span></text:p>
      </text:section>
      <text:h text:style-name="Heading_20_4" text:outline-level="4">Coleta de itens:</text:h>
      <text:section text:style-name="Sect1" text:name="Seção5">
        <text:p text:style-name="P9"><text:bookmark text:name="code-block-viewer Copia 4"/><text:span text:style-name="Source_20_Text">acao(pegar(Item), ...)</text:span></text:p>
      </text:section>
      <text:h text:style-name="Heading_20_4" text:outline-level="4">Combate:</text:h>
      <text:section text:style-name="Sect1" text:name="Seção6">
        <text:p text:style-name="P9"><text:bookmark text:name="code-block-viewer Copia 5"/><text:span text:style-name="Source_20_Text">acao(lutar(Inimigo), ...)</text:span></text:p>
      </text:section>
      <text:p text:style-name="Horizontal_20_Line"><text:soft-page-break/></text:p>
      <text:h text:style-name="Heading_20_3" text:outline-level="3">📌 Sistema de poder</text:h>
      <text:p text:style-name="Text_20_body">O poder do jogador é calculado dinamicamente:</text:p>
      <text:section text:style-name="Sect1" text:name="Seção7">
        <text:p text:style-name="P9"><text:bookmark text:name="code-block-viewer Copia 6"/><text:span text:style-name="Source_20_Text">poder([espada|T],P) :- ...</text:span></text:p>
      </text:section>
      <text:p text:style-name="Text_20_body">Isso demonstra uso de:</text:p>
      <text:p text:style-name="Text_20_body">✔ Recursão<text:line-break/>✔ Acumulação de valores<text:line-break/>✔ Inferência baseada em lista</text:p>
      <text:p text:style-name="Horizontal_20_Line"/>
      <text:h text:style-name="Heading_20_2" text:outline-level="2">⚙️ 4. Regras Principais (Alta Complexidade)</text:h>
      <text:p text:style-name="Text_20_body">O jogo possui diversas regras que aumentam a dificuldade:</text:p>
      <text:p text:style-name="Horizontal_20_Line"/>
      <text:h text:style-name="Heading_20_3" text:outline-level="3">🔥 Restrições infernais</text:h>
      <text:list text:style-name="L6">
        <text:list-item>
          <text:p text:style-name="P12">Não pode enfrentar o dragão sem chave </text:p>
        </text:list-item>
        <text:list-item>
          <text:p text:style-name="P12">Precisa de arma forte </text:p>
        </text:list-item>
        <text:list-item>
          <text:p text:style-name="P12">Vida deve ser maior que zero </text:p>
        </text:list-item>
        <text:list-item>
          <text:p text:style-name="P13">Não pode repetir estados </text:p>
        </text:list-item>
      </text:list>
      <text:p text:style-name="Horizontal_20_Line"/>
      <text:h text:style-name="Heading_20_3" text:outline-level="3">🧠 Planejamento inteligente</text:h>
      <text:section text:style-name="Sect1" text:name="Seção8">
        <text:p text:style-name="P9"><text:bookmark text:name="code-block-viewer Copia 7"/><text:span text:style-name="Source_20_Text">planejar(Estado, Visitados, Plano, Final)</text:span></text:p>
      </text:section>
      <text:p text:style-name="Text_20_body">O Prolog:</text:p>
      <text:list text:style-name="L7">
        <text:list-item>
          <text:p text:style-name="P14">Testa todas as possibilidades </text:p>
        </text:list-item>
        <text:list-item>
          <text:p text:style-name="P14">Usa backtracking </text:p>
        </text:list-item>
        <text:list-item>
          <text:p text:style-name="P14">Evita ciclos </text:p>
        </text:list-item>
        <text:list-item>
          <text:p text:style-name="P15">Aplica poda lógica </text:p>
        </text:list-item>
      </text:list>
      <text:p text:style-name="Horizontal_20_Line"/>
      <text:h text:style-name="Heading_20_3" text:outline-level="3">🏆 Otimização</text:h>
      <text:section text:style-name="Sect1" text:name="Seção9">
        <text:p text:style-name="P9"><text:bookmark text:name="code-block-viewer Copia 8"/><text:span text:style-name="Source_20_Text">resolver_melhor(PlanoMelhor)</text:span></text:p>
      </text:section>
      <text:p text:style-name="Text_20_body">Aqui o sistema:</text:p>
      <text:list text:style-name="L8">
        <text:list-item>
          <text:p text:style-name="P16">Gera todas as soluções possíveis </text:p>
        </text:list-item>
        <text:list-item>
          <text:p text:style-name="P16">Compara custos </text:p>
        </text:list-item>
        <text:list-item>
          <text:p text:style-name="P17">Retorna o melhor plano </text:p>
        </text:list-item>
      </text:list>
      <text:p text:style-name="Horizontal_20_Line"/>
      <text:h text:style-name="Heading_20_2" text:outline-level="2"><text:soft-page-break/>🔍 5. Exemplos de Consultas</text:h>
      <text:p text:style-name="Horizontal_20_Line"/>
      <text:h text:style-name="Heading_20_3" text:outline-level="3">▶️ Consulta 1: Estado inicial</text:h>
      <text:section text:style-name="Sect1" text:name="Seção10">
        <text:p text:style-name="P9"><text:bookmark text:name="code-block-viewer Copia 9"/><text:span text:style-name="Source_20_Text">?- estado_inicial(E).</text:span></text:p>
      </text:section>
      <text:p text:style-name="Text_20_body"><text:span text:style-name="Strong_20_Emphasis">Resultado:</text:span></text:p>
      <text:section text:style-name="Sect1" text:name="Seção11">
        <text:p text:style-name="P9"><text:bookmark text:name="code-block-viewer Copia 10"/><text:span text:style-name="Source_20_Text">E = estado(vila, [], [], 12, 0).</text:span></text:p>
      </text:section>
      <text:p text:style-name="Horizontal_20_Line"/>
      <text:h text:style-name="Heading_20_3" text:outline-level="3">▶️ Consulta 2: Ações possíveis</text:h>
      <text:section text:style-name="Sect1" text:name="Seção12">
        <text:p text:style-name="P9"><text:bookmark text:name="code-block-viewer Copia 11"/><text:span text:style-name="Source_20_Text">?- estado_inicial(E), acao(A, E, N).</text:span></text:p>
      </text:section>
      <text:p text:style-name="Text_20_body"><text:span text:style-name="Strong_20_Emphasis">Resultado (exemplo):</text:span></text:p>
      <text:section text:style-name="Sect1" text:name="Seção13">
        <text:p text:style-name="P18"><text:bookmark text:name="code-block-viewer Copia 12"/><text:span text:style-name="Source_20_Text">A = mover(vila, floresta)</text:span></text:p>
        <text:p text:style-name="P19"><text:span text:style-name="Source_20_Text">A = pegar(escudo)</text:span></text:p>
      </text:section>
      <text:p text:style-name="Horizontal_20_Line"/>
      <text:h text:style-name="Heading_20_3" text:outline-level="3">▶️ Consulta 3: Planejamento</text:h>
      <text:section text:style-name="Sect1" text:name="Seção14">
        <text:p text:style-name="P9"><text:bookmark text:name="code-block-viewer Copia 13"/><text:span text:style-name="Source_20_Text">?- estado_inicial(E), planejar(E, [E], Plano, Final).</text:span></text:p>
      </text:section>
      <text:p text:style-name="Text_20_body"><text:span text:style-name="Strong_20_Emphasis">Resultado (exemplo):</text:span></text:p>
      <text:section text:style-name="Sect1" text:name="Seção15">
        <text:p text:style-name="P9"><text:bookmark text:name="code-block-viewer Copia 14"/><text:span text:style-name="Source_20_Text">Plano = [pegar(escudo), mover(vila, floresta), pegar(espada), ...]</text:span></text:p>
      </text:section>
      <text:p text:style-name="Horizontal_20_Line"/>
      <text:h text:style-name="Heading_20_3" text:outline-level="3">▶️ Consulta 4: Melhor solução (🔥 principal)</text:h>
      <text:section text:style-name="Sect1" text:name="Seção16">
        <text:p text:style-name="P9"><text:bookmark text:name="code-block-viewer Copia 15"/><text:span text:style-name="Source_20_Text">?- resolver_melhor(P).</text:span></text:p>
      </text:section>
      <text:p text:style-name="Text_20_body"><text:span text:style-name="Strong_20_Emphasis">Resultado:</text:span></text:p>
      <text:section text:style-name="Sect1" text:name="Seção17">
        <text:p text:style-name="P9"><text:bookmark text:name="code-block-viewer Copia 16"/><text:span text:style-name="Source_20_Text">P = [sequência ótima de ações]</text:span></text:p>
      </text:section>
      <text:p text:style-name="Horizontal_20_Line"/>
      <text:h text:style-name="Heading_20_2" text:outline-level="2">💡 6. Características Avançadas (Dificuldade 10000)</text:h>
      <text:p text:style-name="Text_20_body">Este jogo possui alto nível de complexidade devido a:</text:p>
      <text:list text:style-name="L9">
        <text:list-item>
          <text:p text:style-name="P20">🔁 Uso intensivo de <text:span text:style-name="Strong_20_Emphasis">backtracking</text:span> </text:p>
        </text:list-item>
        <text:list-item>
          <text:p text:style-name="P20">🧠 Inferência de estratégias automaticamente </text:p>
        </text:list-item>
        <text:list-item>
          <text:p text:style-name="P20">🚫 Restrições lógicas encadeadas </text:p>
        </text:list-item>
        <text:list-item>
          <text:p text:style-name="P20">📉 Otimização de custo </text:p>
        </text:list-item>
        <text:list-item>
          <text:p text:style-name="P20">🔄 Evita loops com estados visitados </text:p>
        </text:list-item>
        <text:list-item>
          <text:p text:style-name="P20">⚔️ Sistema de combate dinâmico </text:p>
        </text:list-item>
        <text:list-item>
          <text:p text:style-name="P21">📦 Inventário com impacto direto no resultado </text:p>
        </text:list-item>
      </text:list>
      <text:p text:style-name="Horizontal_20_Line"><text:soft-page-break/></text:p>
      <text:h text:style-name="Heading_20_2" text:outline-level="2">🧾 7. Conclusão</text:h>
      <text:p text:style-name="Text_20_body">O desenvolvimento deste RPG lógico demonstrou o poder da programação declarativa utilizando Prolog.</text:p>
      <text:p text:style-name="Text_20_body">Diferente de abordagens tradicionais:</text:p>
      <text:list text:style-name="L10">
        <text:list-item>
          <text:p text:style-name="P22">Não há controle explícito de fluxo </text:p>
        </text:list-item>
        <text:list-item>
          <text:p text:style-name="P22">O sistema encontra soluções sozinho </text:p>
        </text:list-item>
        <text:list-item>
          <text:p text:style-name="P23">O comportamento emerge das regras </text:p>
        </text:list-item>
      </text:list>
      <text:p text:style-name="Text_20_body">O jogo atingiu um alto nível de complexidade ("modo infernal"), utilizando:</text:p>
      <text:p text:style-name="Text_20_body">✔ Fatos e regras bem estruturados<text:line-break/>✔ Inferência lógica avançada<text:line-break/>✔ Uso eficiente de backtracking<text:line-break/>✔ Modelagem robusta do domínio</text:p>
      <text:p text:style-name="Text_20_body">Este projeto evidencia como a programação lógica pode ser aplicada na criação de sistemas complexos, como jogos, simuladores e planejadores inteligentes.</text:p>
      <text:p text:style-name="Horizontal_20_Line"/>
      <text:h text:style-name="Heading_20_2" text:outline-level="2">🚀 (Opcional para impressionar o professor)</text:h>
      <text:p text:style-name="Text_20_body">Se quiser deixar seu trabalho ainda mais forte, você pode adicionar:</text:p>
      <text:list text:style-name="L11">
        <text:list-item>
          <text:p text:style-name="P24">Interface gráfica (SWI-Prolog + web) </text:p>
        </text:list-item>
        <text:list-item>
          <text:p text:style-name="P24">Impressão do mapa </text:p>
        </text:list-item>
        <text:list-item>
          <text:p text:style-name="P24">Sistema de níveis </text:p>
        </text:list-item>
        <text:list-item>
          <text:p text:style-name="P24">Mais inimigos e itens </text:p>
        </text:list-item>
        <text:list-item>
          <text:p text:style-name="P25">IA adversári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7T08:28:11.090870400</meta:creation-date>
    <dc:date>2026-05-07T08:28:31.388853800</dc:date>
    <meta:editing-duration>PT20S</meta:editing-duration>
    <meta:editing-cycles>1</meta:editing-cycles>
    <meta:document-statistic meta:table-count="0" meta:image-count="0" meta:object-count="0" meta:page-count="5" meta:paragraph-count="121" meta:word-count="646" meta:character-count="4146" meta:non-whitespace-character-count="3621"/>
    <meta:generator>LibreOffice/25.8.5.2$Windows_X86_64 LibreOffice_project/9c8b85f387cc00a89945a79c9e6239f32e450ac2</meta:generator>
  </office:meta>
</office:document-meta>
</file>