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==========================================================</text:p>
      <text:p text:style-name="Standard">% RPG LÓGICO INFERNAL - ENGINE PROFISSIONAL (SWISH)</text:p>
      <text:p text:style-name="Standard">% ==========================================================</text:p>
      <text:p text:style-name="Standard"/>
      <text:p text:style-name="Standard">:- use_module(library(lists)).</text:p>
      <text:p text:style-name="Standard"/>
      <text:p text:style-name="Standard">% ==========================================================</text:p>
      <text:p text:style-name="Standard">% 1. ESTADO</text:p>
      <text:p text:style-name="Standard">% ==========================================================</text:p>
      <text:p text:style-name="Standard">% estado(Posicao, Inventario, Derrotados, Vida, Custo)</text:p>
      <text:p text:style-name="Standard"/>
      <text:p text:style-name="Standard">estado_inicial(estado(vila, [], [], 12, 0)).</text:p>
      <text:p text:style-name="Standard"/>
      <text:p text:style-name="Standard">% ==========================================================</text:p>
      <text:p text:style-name="Standard">% 2. MAPA</text:p>
      <text:p text:style-name="Standard">% ==========================================================</text:p>
      <text:p text:style-name="Standard"/>
      <text:p text:style-name="Standard">conectado(vila, floresta).</text:p>
      <text:p text:style-name="Standard">conectado(floresta, caverna).</text:p>
      <text:p text:style-name="Standard">conectado(caverna, ruinas).</text:p>
      <text:p text:style-name="Standard">conectado(ruinas, torre).</text:p>
      <text:p text:style-name="Standard">conectado(torre, dragao).</text:p>
      <text:p text:style-name="Standard"/>
      <text:p text:style-name="Standard">% atalhos (aumenta complexidade)</text:p>
      <text:p text:style-name="Standard">conectado(floresta, ruinas).</text:p>
      <text:p text:style-name="Standard">conectado(caverna, torre).</text:p>
      <text:p text:style-name="Standard"/>
      <text:p text:style-name="Standard">caminho(X,Y) :- conectado(X,Y).</text:p>
      <text:p text:style-name="Standard">caminho(X,Y) :- conectado(Y,X).</text:p>
      <text:p text:style-name="Standard"/>
      <text:p text:style-name="Standard">% ==========================================================</text:p>
      <text:p text:style-name="Standard">% 3. ITENS</text:p>
      <text:p text:style-name="Standard">% ==========================================================</text:p>
      <text:p text:style-name="Standard"/>
      <text:p text:style-name="Standard">local_item(espada, floresta).</text:p>
      <text:p text:style-name="Standard">local_item(escudo, vila).</text:p>
      <text:p text:style-name="Standard">local_item(chave, caverna).</text:p>
      <text:p text:style-name="Standard">local_item(cajado, torre).</text:p>
      <text:p text:style-name="Standard">local_item(armadura, ruinas).</text:p>
      <text:p text:style-name="Standard"/>
      <text:p text:style-name="Standard">% ==========================================================</text:p>
      <text:p text:style-name="Standard">% 4. INIMIGOS</text:p>
      <text:p text:style-name="Standard">% ==========================================================</text:p>
      <text:p text:style-name="Standard"/>
      <text:p text:style-name="Standard">inimigo(goblin, floresta, 5).</text:p>
      <text:p text:style-name="Standard">inimigo(troll, caverna, 9).</text:p>
      <text:p text:style-name="Standard">inimigo(espectro, ruinas, 13).</text:p>
      <text:p text:style-name="Standard">inimigo(guardiao, torre, 17).</text:p>
      <text:p text:style-name="Standard">inimigo(dragao, dragao, 25).</text:p>
      <text:p text:style-name="Standard"/>
      <text:p text:style-name="Standard">% ==========================================================</text:p>
      <text:p text:style-name="Standard">% 5. PODER (OTIMIZADO)</text:p>
      <text:p text:style-name="Standard"><text:soft-page-break/>% ==========================================================</text:p>
      <text:p text:style-name="Standard"/>
      <text:p text:style-name="Standard">valor_item(espada,6).</text:p>
      <text:p text:style-name="Standard">valor_item(escudo,3).</text:p>
      <text:p text:style-name="Standard">valor_item(cajado,7).</text:p>
      <text:p text:style-name="Standard">valor_item(armadura,5).</text:p>
      <text:p text:style-name="Standard"/>
      <text:p text:style-name="Standard">poder(Inv,P) :-</text:p>
      <text:p text:style-name="Standard"><text:s text:c="4"/>findall(V,</text:p>
      <text:p text:style-name="Standard"><text:s text:c="8"/>(member(I,Inv), valor_item(I,V)),</text:p>
      <text:p text:style-name="Standard"><text:s text:c="8"/>Lista),</text:p>
      <text:p text:style-name="Standard"><text:s text:c="4"/>sum_list(Lista,Soma),</text:p>
      <text:p text:style-name="Standard"><text:s text:c="4"/>P is Soma + 1.</text:p>
      <text:p text:style-name="Standard"/>
      <text:p text:style-name="Standard">% bônus estratégico</text:p>
      <text:p text:style-name="Standard">bonus(Inv,5) :-</text:p>
      <text:p text:style-name="Standard"><text:s text:c="4"/>member(espada,Inv),</text:p>
      <text:p text:style-name="Standard"><text:s text:c="4"/>member(armadura,Inv), !.</text:p>
      <text:p text:style-name="Standard">bonus(_,0).</text:p>
      <text:p text:style-name="Standard"/>
      <text:p text:style-name="Standard">% ==========================================================</text:p>
      <text:p text:style-name="Standard">% 6. AÇÕES</text:p>
      <text:p text:style-name="Standard">% ==========================================================</text:p>
      <text:p text:style-name="Standard"/>
      <text:p text:style-name="Standard">% mover</text:p>
      <text:p text:style-name="Standard">acao(mover(De,Para),</text:p>
      <text:p text:style-name="Standard"><text:s text:c="5"/>estado(De,Inv,Der,V,C),</text:p>
      <text:p text:style-name="Standard"><text:s text:c="5"/>estado(Para,Inv,Der,V,C1)) :-</text:p>
      <text:p text:style-name="Standard"><text:s text:c="4"/>caminho(De,Para),</text:p>
      <text:p text:style-name="Standard"><text:s text:c="4"/>C1 is C + 1.</text:p>
      <text:p text:style-name="Standard"/>
      <text:p text:style-name="Standard">% pegar item</text:p>
      <text:p text:style-name="Standard">acao(pegar(Item),</text:p>
      <text:p text:style-name="Standard"><text:s text:c="5"/>estado(Local,Inv,Der,V,C),</text:p>
      <text:p text:style-name="Standard"><text:s text:c="5"/>estado(Local,[Item|Inv],Der,V,C1)) :-</text:p>
      <text:p text:style-name="Standard"><text:s text:c="4"/>local_item(Item, Local),</text:p>
      <text:p text:style-name="Standard"><text:s text:c="4"/>\+ member(Item, Inv),</text:p>
      <text:p text:style-name="Standard"><text:s text:c="4"/>C1 is C + 1.</text:p>
      <text:p text:style-name="Standard"/>
      <text:p text:style-name="Standard">% lutar</text:p>
      <text:p text:style-name="Standard">acao(lutar(Inimigo),</text:p>
      <text:p text:style-name="Standard"><text:s text:c="5"/>estado(Local,Inv,Der,V,C),</text:p>
      <text:p text:style-name="Standard"><text:s text:c="5"/>estado(Local,Inv,[Inimigo|Der],V2,C1)) :-</text:p>
      <text:p text:style-name="Standard"><text:s text:c="4"/>inimigo(Inimigo, Local, Forca),</text:p>
      <text:p text:style-name="Standard"><text:s text:c="4"/>\+ member(Inimigo, Der),</text:p>
      <text:p text:style-name="Standard"><text:s text:c="4"/>poder(Inv,P),</text:p>
      <text:p text:style-name="Standard"><text:s text:c="4"/>bonus(Inv,B),</text:p>
      <text:p text:style-name="Standard"><text:s text:c="4"/>P + B + V &gt;= Forca,</text:p>
      <text:p text:style-name="Standard"><text:s text:c="4"/>V2 is V - 3,</text:p>
      <text:p text:style-name="Standard"><text:s text:c="4"/>V2 &gt; 0,</text:p>
      <text:p text:style-name="Standard"><text:s text:c="4"/>C1 is C + 2.</text:p>
      <text:p text:style-name="Standard"/>
      <text:p text:style-name="Standard"><text:soft-page-break/>% descansar (melhora estratégia)</text:p>
      <text:p text:style-name="Standard">acao(descansar,</text:p>
      <text:p text:style-name="Standard"><text:s text:c="5"/>estado(Local,Inv,Der,V,C),</text:p>
      <text:p text:style-name="Standard"><text:s text:c="5"/>estado(Local,Inv,Der,V2,C1)) :-</text:p>
      <text:p text:style-name="Standard"><text:s text:c="4"/>V &lt; 12,</text:p>
      <text:p text:style-name="Standard"><text:s text:c="4"/>V2 is V + 2,</text:p>
      <text:p text:style-name="Standard"><text:s text:c="4"/>C1 is C + 2.</text:p>
      <text:p text:style-name="Standard"/>
      <text:p text:style-name="Standard">% ==========================================================</text:p>
      <text:p text:style-name="Standard">% 7. RESTRIÇÕES (MAIS SEGURAS)</text:p>
      <text:p text:style-name="Standard">% ==========================================================</text:p>
      <text:p text:style-name="Standard"/>
      <text:p text:style-name="Standard">% precisa chave para dragão</text:p>
      <text:p text:style-name="Standard">restricao(estado(_,Inv,Der,_,_)) :-</text:p>
      <text:p text:style-name="Standard"><text:s text:c="4"/>(member(dragao, Der) -&gt; member(chave, Inv) ; true).</text:p>
      <text:p text:style-name="Standard"/>
      <text:p text:style-name="Standard">% limite de inventário (evita explosão)</text:p>
      <text:p text:style-name="Standard">restricao(estado(_,Inv,_,_,_)) :-</text:p>
      <text:p text:style-name="Standard"><text:s text:c="4"/>length(Inv,N),</text:p>
      <text:p text:style-name="Standard"><text:s text:c="4"/>N =&lt; 5.</text:p>
      <text:p text:style-name="Standard"/>
      <text:p text:style-name="Standard">% ==========================================================</text:p>
      <text:p text:style-name="Standard">% 8. OBJETIVO</text:p>
      <text:p text:style-name="Standard">% ==========================================================</text:p>
      <text:p text:style-name="Standard"/>
      <text:p text:style-name="Standard">objetivo(estado(dragao,Inv,Der,V,_)) :-</text:p>
      <text:p text:style-name="Standard"><text:s text:c="4"/>member(dragao, Der),</text:p>
      <text:p text:style-name="Standard"><text:s text:c="4"/>member(chave, Inv),</text:p>
      <text:p text:style-name="Standard"><text:s text:c="4"/>arma_forte(Inv),</text:p>
      <text:p text:style-name="Standard"><text:s text:c="4"/>V &gt; 0.</text:p>
      <text:p text:style-name="Standard"/>
      <text:p text:style-name="Standard">arma_forte(Inv) :-</text:p>
      <text:p text:style-name="Standard"><text:s text:c="4"/>member(espada,Inv);</text:p>
      <text:p text:style-name="Standard"><text:s text:c="4"/>member(cajado,Inv).</text:p>
      <text:p text:style-name="Standard"/>
      <text:p text:style-name="Standard">% ==========================================================</text:p>
      <text:p text:style-name="Standard">% 9. PLANEJAMENTO (COM LIMITE)</text:p>
      <text:p text:style-name="Standard">% ==========================================================</text:p>
      <text:p text:style-name="Standard"/>
      <text:p text:style-name="Standard">% limite de profundidade (ESSENCIAL no SWISH)</text:p>
      <text:p text:style-name="Standard">limite(15).</text:p>
      <text:p text:style-name="Standard"/>
      <text:p text:style-name="Standard">planejar(Estado, _, [], Estado, _) :-</text:p>
      <text:p text:style-name="Standard"><text:s text:c="4"/>objetivo(Estado).</text:p>
      <text:p text:style-name="Standard"/>
      <text:p text:style-name="Standard">planejar(Estado, Visitados, [Acao|Plano], Final, Prof) :-</text:p>
      <text:p text:style-name="Standard"><text:s text:c="4"/>limite(L),</text:p>
      <text:p text:style-name="Standard"><text:s text:c="4"/>Prof &lt; L,</text:p>
      <text:p text:style-name="Standard"><text:s text:c="4"/>acao(Acao, Estado, NovoEstado),</text:p>
      <text:p text:style-name="Standard"><text:s text:c="4"/>NovoEstado = estado(_,_,_,V,_),</text:p>
      <text:p text:style-name="Standard"><text:s text:c="4"/>V &gt; 0,</text:p>
      <text:p text:style-name="Standard"><text:s text:c="4"/>\+ member(NovoEstado, Visitados),</text:p>
      <text:p text:style-name="Standard"><text:soft-page-break/><text:s text:c="4"/>restricao(NovoEstado),</text:p>
      <text:p text:style-name="Standard"><text:s text:c="4"/>P1 is Prof + 1,</text:p>
      <text:p text:style-name="Standard"><text:s text:c="4"/>planejar(NovoEstado, [NovoEstado|Visitados], Plano, Final, P1).</text:p>
      <text:p text:style-name="Standard"/>
      <text:p text:style-name="Standard">% ==========================================================</text:p>
      <text:p text:style-name="Standard">% 10. RESOLVER (VERSÃO SEGURA)</text:p>
      <text:p text:style-name="Standard">% ==========================================================</text:p>
      <text:p text:style-name="Standard"/>
      <text:p text:style-name="Standard">resolver(Plano) :-</text:p>
      <text:p text:style-name="Standard"><text:s text:c="4"/>estado_inicial(E),</text:p>
      <text:p text:style-name="Standard"><text:s text:c="4"/>planejar(E,[E],Plano,_,0).</text:p>
      <text:p text:style-name="Standard"/>
      <text:p text:style-name="Standard">% ==========================================================</text:p>
      <text:p text:style-name="Standard">% 11. MELHOR SOLUÇÃO (CONTROLADA)</text:p>
      <text:p text:style-name="Standard">% ==========================================================</text:p>
      <text:p text:style-name="Standard"/>
      <text:p text:style-name="Standard">resolver_melhor(PlanoMelhor) :-</text:p>
      <text:p text:style-name="Standard"><text:s text:c="4"/>findall((Plano,Custo),</text:p>
      <text:p text:style-name="Standard"><text:s text:c="8"/>(</text:p>
      <text:p text:style-name="Standard"><text:s text:c="12"/>estado_inicial(E),</text:p>
      <text:p text:style-name="Standard"><text:s text:c="12"/>planejar(E,[E],Plano,estado(_,_,_,_,Custo),0)</text:p>
      <text:p text:style-name="Standard"><text:s text:c="8"/>),</text:p>
      <text:p text:style-name="Standard"><text:s text:c="8"/>Solucoes),</text:p>
      <text:p text:style-name="Standard"><text:s text:c="4"/>Solucoes \= [],</text:p>
      <text:p text:style-name="Standard"><text:s text:c="4"/>melhor_plano(Solucoes, PlanoMelhor).</text:p>
      <text:p text:style-name="Standard"/>
      <text:p text:style-name="Standard">melhor_plano([(P,_)], P).</text:p>
      <text:p text:style-name="Standard">melhor_plano([(P1,C1),(P2,C2)|R], Melhor) :-</text:p>
      <text:p text:style-name="Standard"><text:s text:c="4"/>(C1 =&lt; C2 -&gt;</text:p>
      <text:p text:style-name="Standard"><text:s text:c="8"/>melhor_plano([(P1,C1)|R], Melhor)</text:p>
      <text:p text:style-name="Standard"><text:s text:c="4"/>;</text:p>
      <text:p text:style-name="Standard"><text:s text:c="8"/>melhor_plano([(P2,C2)|R], Melhor)</text:p>
      <text:p text:style-name="Standard"><text:s text:c="4"/>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08:29:46.690412900</meta:creation-date>
    <dc:date>2026-05-07T08:45:40.343005200</dc:date>
    <meta:editing-duration>PT33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4" meta:paragraph-count="154" meta:word-count="389" meta:character-count="4733" meta:non-whitespace-character-count="4186"/>
  </office:meta>
</office:document-meta>
</file>